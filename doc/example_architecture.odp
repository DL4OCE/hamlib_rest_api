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EB195E74.png" manifest:media-type="image/png"/>
  <manifest:file-entry manifest:full-path="Pictures/1000000100000320000002384A8DE5D2.png" manifest:media-type="image/png"/>
  <manifest:file-entry manifest:full-path="Pictures/100000010000032000000159AA226B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4c7dc" draw:textarea-horizontal-align="center" draw:textarea-vertical-align="middle" draw:auto-grow-height="false" fo:min-height="0.558cm" fo:min-width="9.43cm" loext:decorative="false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center" draw:textarea-vertical-align="middle" draw:auto-grow-height="false" fo:min-height="0.25cm" fo:min-width="13.193cm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_20__28_Rounded_29_" svg:stroke-linecap="round" draw:fill="none" loext:fill-use-slide-background="false" draw:textarea-horizontal-align="right" draw:textarea-vertical-align="top" draw:auto-grow-height="false" fo:min-height="3.29cm" fo:min-width="13.65cm" loext:decorative="false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center" draw:textarea-vertical-align="middle" draw:auto-grow-height="false" fo:min-height="0.5cm" fo:min-width="1.5cm" loext:decorative="false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center" draw:textarea-vertical-align="middle" draw:auto-grow-height="false" fo:min-height="0.5cm" fo:min-width="1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 loext:decorative="false"/>
      <style:paragraph-properties style:writing-mode="lr-tb"/>
    </style:style>
    <style:style style:name="gr10" style:family="graphic" style:parent-style-name="objectwithoutfill">
      <style:graphic-properties draw:marker-start="" draw:marker-start-width="0.2cm" draw:marker-end="Linienspitzen_20_6" draw:marker-end-width="0.2cm" draw:fill="none" draw:textarea-vertical-align="middle" loext:decorative="false"/>
    </style:style>
    <style:style style:name="gr11" style:family="graphic" style:parent-style-name="objectwithoutfill">
      <style:graphic-properties draw:marker-start="" draw:marker-start-width="0.2cm" draw:marker-end="Linienspitzen_20_6" draw:marker-end-width="0.2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start="" draw:marker-start-width="0.2cm" draw:marker-end="Linienspitzen_20_5" draw:marker-end-width="0.2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center" draw:textarea-vertical-align="middle" draw:auto-grow-height="false" fo:min-height="0.558cm" fo:min-width="2.419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solid" draw:fill-color="#b4c7dc"/>
      <style:paragraph-properties fo:text-align="center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3" style:family="paragraph">
      <style:paragraph-properties fo:text-align="right"/>
      <style:text-properties style:text-position="super 58%" fo:font-size="10.5pt" style:font-size-asian="10.5pt" style:font-size-complex="10.5pt"/>
    </style:style>
    <style:style style:name="P4" style:family="paragraph">
      <loext:graphic-properties draw:fill="none"/>
      <style:paragraph-properties fo:text-align="right"/>
      <style:text-properties style:text-position="super 58%" fo:font-size="10.5pt" style:font-size-asian="10.5pt" style:font-size-complex="10.5pt"/>
    </style:style>
    <style:style style:name="P5" style:family="paragraph">
      <style:paragraph-properties fo:text-align="center"/>
      <style:text-properties style:font-name="Liberation Sans1" fo:font-size="10pt" style:letter-kerning="true" style:font-name-asian="Liberation Mono" style:font-size-asian="10pt" style:font-name-complex="Liberation Mono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none" draw:fill-color="#ffffff"/>
      <style:paragraph-properties fo:text-align="center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</style:style>
    <style:style style:name="T1" style:family="text">
      <style:text-properties style:font-name="Liberation Sans1"/>
    </style:style>
    <style:style style:name="T2" style:family="text">
      <style:text-properties style:text-position="super 58%" fo:font-size="10.5pt" style:font-size-asian="10.5pt" style:font-size-complex="10.5pt"/>
    </style:style>
    <style:style style:name="T3" style:family="text">
      <style:text-properties fo:color="#000000" loext:opacity="100%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0" draw:id="id10" draw:layer="layout" svg:width="9.93cm" svg:height="0.808cm" svg:x="0.904cm" svg:y="1.514cm">
          <text:p text:style-name="P1"><text:span text:style-name="T1">Central Control Software (Logging software, custom GUI,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3.693cm" svg:height="0.5cm" svg:x="1.1cm" svg:y="3.989cm">
          <text:p text:style-name="P1"><text:span text:style-name="T1">REST API for hamli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15cm" svg:height="3.54cm" svg:x="0.85cm" svg:y="3.239cm">
          <text:p text:style-name="P3"><text:span text:style-name="T2">Raspberry Pi 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cm" svg:height="0.75cm" svg:x="1.1cm" svg:y="5.739cm">
          <text:p text:style-name="P1"><text:span text:style-name="T1">rigctld@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cm" svg:height="0.75cm" svg:x="3.35cm" svg:y="5.739cm">
          <text:p text:style-name="P1"><text:span text:style-name="T1">rigctld@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cm" svg:height="0.75cm" svg:x="5.6cm" svg:y="5.739cm">
          <text:p text:style-name="P1"><text:span text:style-name="T1">rigctld@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25cm" svg:height="0.75cm" svg:x="9.05cm" svg:y="5.739cm">
          <text:p text:style-name="P1"><text:span text:style-name="T1">rotctld@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2.25cm" svg:height="0.75cm" svg:x="11.55cm" svg:y="5.739cm">
          <text:p text:style-name="P5"><text:span text:style-name="T3"><text:a xlink:href="mailto:rotctld@2" xlink:type="simple">rotctld@2</text:a></text:span></text:p>
          <draw:enhanced-geometry svg:viewBox="0 0 21600 21600" draw:type="rectangle" draw:enhanced-path="M 0 0 L 21600 0 21600 21600 0 21600 0 0 Z N"/>
        </draw:custom-shape>
        <draw:frame draw:style-name="gr6" draw:text-style-name="P6" xml:id="id5" draw:id="id5" draw:layer="layout" svg:width="2.159cm" svg:height="0.931cm" svg:x="0.889cm" svg:y="8.597cm">
          <draw:image xlink:href="Pictures/100000010000032000000159AA226BE0.png" xlink:type="simple" xlink:show="embed" xlink:actuate="onLoad" draw:mime-type="image/png">
            <text:p text:style-name="P6"/>
          </draw:image>
        </draw:frame>
        <draw:frame draw:style-name="gr7" draw:text-style-name="P8" draw:layer="layout" svg:width="1.464cm" svg:height="0.569cm" svg:x="1.182cm" svg:y="9.528cm">
          <draw:text-box>
            <text:p text:style-name="P7"><text:span text:style-name="T4">TRX #1</text:span></text:p>
          </draw:text-box>
        </draw:frame>
        <draw:frame draw:style-name="gr8" draw:text-style-name="P6" xml:id="id2" draw:id="id2" draw:layer="layout" svg:width="2.198cm" svg:height="1.56cm" svg:x="11.81cm" svg:y="8.083cm">
          <draw:image xlink:href="Pictures/1000000100000320000002384A8DE5D2.png" xlink:type="simple" xlink:show="embed" xlink:actuate="onLoad" draw:mime-type="image/png">
            <text:p/>
          </draw:image>
        </draw:frame>
        <draw:frame draw:style-name="gr8" draw:text-style-name="P6" draw:layer="layout" svg:width="3.592cm" svg:height="3.592cm" svg:x="8.035cm" svg:y="7.179cm">
          <draw:image xlink:href="Pictures/100000010000025800000258EB195E74.png" xlink:type="simple" xlink:show="embed" xlink:actuate="onLoad" draw:mime-type="image/png">
            <text:p/>
          </draw:image>
        </draw:frame>
        <draw:frame draw:style-name="gr7" draw:text-style-name="P10" draw:layer="layout" svg:width="1.922cm" svg:height="0.569cm" svg:x="9.002cm" svg:y="9.712cm">
          <draw:text-box>
            <text:p text:style-name="P9">antenna #1</text:p>
          </draw:text-box>
        </draw:frame>
        <draw:frame draw:style-name="gr9" draw:text-style-name="P10" draw:layer="layout" svg:width="2.261cm" svg:height="0.645cm" svg:x="12.393cm" svg:y="9.643cm">
          <draw:text-box>
            <text:p text:style-name="P9">antenna #2</text:p>
          </draw:text-box>
        </draw:frame>
        <draw:connector draw:style-name="gr10" draw:text-style-name="P11" draw:layer="layout" draw:type="line" svg:x1="12.675cm" svg:y1="6.489cm" svg:x2="12.909cm" svg:y2="8.083cm" draw:start-shape="id1" draw:start-glue-point="2" draw:end-shape="id2" draw:end-glue-point="0" svg:d="M12675 6489l234 1594" svg:viewBox="0 0 235 1595">
          <text:p/>
        </draw:connector>
        <draw:connector draw:style-name="gr10" draw:text-style-name="P11" draw:layer="layout" draw:type="line" svg:x1="10.175cm" svg:y1="6.489cm" svg:x2="9.487cm" svg:y2="7.862cm" draw:start-shape="id3" draw:start-glue-point="2" svg:d="M10175 6489l-688 1373" svg:viewBox="0 0 689 1374">
          <text:p/>
        </draw:connector>
        <draw:connector draw:style-name="gr11" draw:text-style-name="P12" draw:layer="layout" draw:type="line" svg:x1="2.1cm" svg:y1="6.489cm" svg:x2="1.968cm" svg:y2="8.597cm" draw:start-shape="id4" draw:start-glue-point="2" draw:end-shape="id5" draw:end-glue-point="0" svg:d="M2100 6489l-132 2108" svg:viewBox="0 0 133 2109">
          <text:p text:style-name="P6"><text:span text:style-name="T4"/></text:p>
        </draw:connector>
        <draw:frame draw:style-name="gr6" draw:text-style-name="P6" xml:id="id7" draw:id="id7" draw:layer="layout" svg:width="2.159cm" svg:height="0.931cm" svg:x="5.501cm" svg:y="8.612cm">
          <draw:image xlink:href="Pictures/100000010000032000000159AA226BE0.png" xlink:type="simple" xlink:show="embed" xlink:actuate="onLoad" draw:mime-type="image/png">
            <text:p/>
          </draw:image>
        </draw:frame>
        <draw:frame draw:style-name="gr7" draw:text-style-name="P8" draw:layer="layout" svg:width="1.464cm" svg:height="0.569cm" svg:x="5.794cm" svg:y="9.543cm">
          <draw:text-box>
            <text:p text:style-name="P7"><text:span text:style-name="T4">TRX #3</text:span></text:p>
          </draw:text-box>
        </draw:frame>
        <draw:connector draw:style-name="gr10" draw:text-style-name="P11" draw:layer="layout" draw:type="line" svg:x1="6.6cm" svg:y1="6.489cm" svg:x2="6.58cm" svg:y2="8.612cm" draw:start-shape="id6" draw:start-glue-point="2" draw:end-shape="id7" draw:end-glue-point="0" svg:d="M6600 6489l-20 2123" svg:viewBox="0 0 21 2124">
          <text:p/>
        </draw:connector>
        <draw:frame draw:style-name="gr7" draw:text-style-name="P14" draw:layer="layout" svg:width="1.495cm" svg:height="1.205cm" draw:transform="rotate (1.48946398365196) translate (1.968cm 8.402cm)">
          <draw:text-box>
            <text:p text:style-name="P13"><text:span text:style-name="T4">USB</text:span><text:span text:style-name="T4"><text:line-break/></text:span><text:span text:style-name="T4">serial</text:span><text:span text:style-name="T4"><text:line-break/></text:span><text:span text:style-name="T4">network</text:span></text:p>
          </draw:text-box>
        </draw:frame>
        <draw:connector draw:style-name="gr12" draw:text-style-name="P12" draw:layer="layout" draw:type="line" svg:x1="6.851cm" svg:y1="4.489cm" svg:x2="2.1cm" svg:y2="5.739cm" draw:start-shape="id8" draw:start-glue-point="2" draw:end-shape="id4" draw:end-glue-point="0" svg:d="M6851 4489l-4751 1250" svg:viewBox="0 0 4752 1251">
          <text:p/>
        </draw:connector>
        <draw:connector draw:style-name="gr12" draw:text-style-name="P12" draw:layer="layout" draw:type="line" svg:x1="6.85cm" svg:y1="4.489cm" svg:x2="4.35cm" svg:y2="5.739cm" draw:end-shape="id9" draw:end-glue-point="0" svg:d="M6850 4489l-2500 1250" svg:viewBox="0 0 2501 1251">
          <text:p/>
        </draw:connector>
        <draw:connector draw:style-name="gr12" draw:text-style-name="P12" draw:layer="layout" draw:type="line" svg:x1="6.85cm" svg:y1="4.489cm" svg:x2="6.6cm" svg:y2="5.739cm" draw:end-shape="id6" draw:end-glue-point="0" svg:d="M6850 4489l-250 1250" svg:viewBox="0 0 251 1251">
          <text:p/>
        </draw:connector>
        <draw:connector draw:style-name="gr12" draw:text-style-name="P12" draw:layer="layout" draw:type="line" svg:x1="6.85cm" svg:y1="4.489cm" svg:x2="10.175cm" svg:y2="5.739cm" draw:end-shape="id3" draw:end-glue-point="0" svg:d="M6850 4489l3325 1250" svg:viewBox="0 0 3326 1251">
          <text:p/>
        </draw:connector>
        <draw:connector draw:style-name="gr12" draw:text-style-name="P12" xml:id="id8" draw:id="id8" draw:layer="layout" draw:type="line" svg:x1="6.851cm" svg:y1="4.489cm" svg:x2="12.675cm" svg:y2="5.739cm" draw:end-shape="id1" draw:end-glue-point="0" svg:d="M6851 4489l5824 1250" svg:viewBox="0 0 5825 1251">
          <text:p/>
        </draw:connector>
        <draw:frame draw:style-name="gr7" draw:text-style-name="P8" draw:layer="layout" svg:width="1.884cm" svg:height="0.569cm" svg:x="5.95cm" svg:y="2.584cm">
          <draw:text-box>
            <text:p><text:span text:style-name="T4">HTTP calls</text:span></text:p>
          </draw:text-box>
        </draw:frame>
        <draw:connector draw:style-name="gr12" draw:text-style-name="P12" draw:layer="layout" draw:type="line" svg:x1="5.869cm" svg:y1="2.322cm" svg:x2="7.946cm" svg:y2="3.989cm" draw:start-shape="id10" draw:start-glue-point="2" draw:end-shape="id11" draw:end-glue-point="0" svg:d="M5869 2322l2077 1667" svg:viewBox="0 0 2078 1668">
          <text:p/>
        </draw:connector>
        <draw:frame draw:style-name="gr6" draw:text-style-name="P6" xml:id="id12" draw:id="id12" draw:layer="layout" svg:width="2.159cm" svg:height="0.931cm" svg:x="3.195cm" svg:y="8.653cm">
          <draw:image xlink:href="Pictures/100000010000032000000159AA226BE0.png" xlink:type="simple" xlink:show="embed" xlink:actuate="onLoad" draw:mime-type="image/png">
            <text:p/>
          </draw:image>
        </draw:frame>
        <draw:frame draw:style-name="gr7" draw:text-style-name="P8" draw:layer="layout" svg:width="1.464cm" svg:height="0.569cm" svg:x="3.488cm" svg:y="9.584cm">
          <draw:text-box>
            <text:p text:style-name="P7"><text:span text:style-name="T4">TRX #2</text:span></text:p>
          </draw:text-box>
        </draw:frame>
        <draw:connector draw:style-name="gr11" draw:text-style-name="P12" draw:layer="layout" draw:type="line" svg:x1="4.35cm" svg:y1="6.489cm" svg:x2="4.274cm" svg:y2="8.653cm" draw:start-shape="id9" draw:start-glue-point="2" draw:end-shape="id12" draw:end-glue-point="0" svg:d="M4350 6489l-76 2164" svg:viewBox="0 0 77 2165">
          <text:p/>
        </draw:connector>
        <draw:frame draw:style-name="gr7" draw:text-style-name="P8" draw:layer="layout" svg:width="0.738cm" svg:height="0.569cm" svg:x="7.922cm" svg:y="5.839cm">
          <draw:text-box>
            <text:p text:style-name="P7"><text:span text:style-name="T4">...</text:span></text:p>
          </draw:text-box>
        </draw:frame>
        <draw:frame draw:style-name="gr7" draw:text-style-name="P8" draw:layer="layout" svg:width="0.738cm" svg:height="0.569cm" svg:x="14.062cm" svg:y="5.82cm">
          <draw:text-box>
            <text:p text:style-name="P7"><text:span text:style-name="T4">...</text:span></text:p>
          </draw:text-box>
        </draw:frame>
        <draw:frame draw:style-name="gr7" draw:text-style-name="P14" draw:layer="layout" svg:width="1.495cm" svg:height="1.205cm" draw:transform="rotate (1.52070537726266) translate (4.274cm 8.425cm)">
          <draw:text-box>
            <text:p text:style-name="P13"><text:span text:style-name="T4">USB</text:span><text:span text:style-name="T4"><text:line-break/></text:span><text:span text:style-name="T4">serial</text:span><text:span text:style-name="T4"><text:line-break/></text:span><text:span text:style-name="T4">network</text:span></text:p>
          </draw:text-box>
        </draw:frame>
        <draw:frame draw:style-name="gr7" draw:text-style-name="P14" draw:layer="layout" svg:width="1.495cm" svg:height="1.205cm" draw:transform="rotate (1.55735729155454) translate (6.5cm 8.484cm)">
          <draw:text-box>
            <text:p text:style-name="P13"><text:span text:style-name="T4">USB</text:span><text:span text:style-name="T4"><text:line-break/></text:span><text:span text:style-name="T4">serial</text:span><text:span text:style-name="T4"><text:line-break/></text:span><text:span text:style-name="T4">network</text:span></text:p>
          </draw:text-box>
        </draw:frame>
        <draw:custom-shape draw:style-name="gr13" draw:text-style-name="P2" xml:id="id13" draw:id="id13" draw:layer="layout" svg:width="2.919cm" svg:height="0.808cm" svg:x="11cm" svg:y="1.5cm">
          <text:p text:style-name="P1"><text:span text:style-name="T1">more software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type="line" svg:x1="12.459cm" svg:y1="2.308cm" svg:x2="7.946cm" svg:y2="3.989cm" draw:start-shape="id13" draw:start-glue-point="2" draw:end-shape="id11" draw:end-glue-point="0" svg:d="M12459 2308l-4513 1681" svg:viewBox="0 0 4514 1682">
          <text:p/>
        </draw:connector>
        <draw:frame draw:style-name="gr7" draw:text-style-name="P8" draw:layer="layout" svg:width="0.738cm" svg:height="0.569cm" svg:x="14.123cm" svg:y="1.614cm">
          <draw:text-box>
            <text:p text:style-name="P7"><text:span text:style-name="T4">...</text:span></text:p>
          </draw:text-box>
        </draw:frame>
        <draw:frame draw:style-name="gr7" draw:text-style-name="P14" draw:layer="layout" svg:width="1.495cm" svg:height="1.205cm" draw:transform="rotate (1.11962871515436) translate (9.396cm 7.949cm)">
          <draw:text-box>
            <text:p text:style-name="P13"><text:span text:style-name="T4">USB</text:span><text:span text:style-name="T4"><text:line-break/></text:span><text:span text:style-name="T4">serial</text:span><text:span text:style-name="T4"><text:line-break/></text:span><text:span text:style-name="T4">network</text:span></text:p>
          </draw:text-box>
        </draw:frame>
        <draw:frame draw:style-name="gr14" draw:text-style-name="P15" draw:layer="layout" svg:width="1.495cm" svg:height="1.205cm" draw:transform="rotate (-1.4154620233674) translate (13.865cm 6.489cm)">
          <draw:text-box>
            <text:p text:style-name="P13"><text:span text:style-name="T4">USB</text:span><text:span text:style-name="T4"><text:line-break/></text:span><text:span text:style-name="T4">serial</text:span><text:span text:style-name="T4"><text:line-break/></text:span><text:span text:style-name="T4">network</text:span></text:p>
          </draw:text-box>
        </draw:frame>
        <draw:frame draw:style-name="gr7" draw:text-style-name="P8" draw:layer="layout" svg:width="0.738cm" svg:height="0.569cm" svg:x="15.362cm" svg:y="5.821cm">
          <draw:text-box>
            <text:p text:style-name="P7"><text:span text:style-name="T4">...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5" draw:display-name="Linienspitzen 5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Linienspitzen_20_6" draw:display-name="Linienspitzen 6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ne Baier</meta:initial-creator>
    <meta:creation-date>2026-06-22T09:57:57.197573688</meta:creation-date>
    <dc:date>2026-06-22T10:47:09.344141983</dc:date>
    <dc:creator>Arne Baier</dc:creator>
    <meta:editing-duration>PT27M46S</meta:editing-duration>
    <meta:editing-cycles>9</meta:editing-cycles>
    <meta:generator>LibreOffice/26.2.4.2$Linux_X86_64 LibreOffice_project/0229ac93fcf0d7cbc6376066c6f35021cef002dc</meta:generator>
    <meta:document-statistic meta:object-count="64"/>
  </office:meta>
</office:document-meta>
</file>